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d24b" officeooo:paragraph-rsid="001bd24b"/>
    </style:style>
    <style:style style:name="P2" style:family="paragraph" style:parent-style-name="Standard">
      <style:text-properties officeooo:rsid="0018b364" officeooo:paragraph-rsid="0018b364"/>
    </style:style>
    <style:style style:name="P3" style:family="paragraph" style:parent-style-name="Standard">
      <style:text-properties officeooo:rsid="001a4f5c" officeooo:paragraph-rsid="001a4f5c"/>
    </style:style>
    <style:style style:name="P4" style:family="paragraph" style:parent-style-name="Standard">
      <style:text-properties fo:font-weight="bold" officeooo:rsid="001bd24b" officeooo:paragraph-rsid="001bd24b" style:font-weight-asian="bold" style:font-weight-complex="bold"/>
    </style:style>
    <style:style style:name="P5" style:family="paragraph" style:parent-style-name="Standard">
      <style:text-properties fo:font-weight="normal" officeooo:rsid="001bd24b" officeooo:paragraph-rsid="001bd24b" style:font-weight-asian="normal" style:font-weight-complex="normal"/>
    </style:style>
    <style:style style:name="P6" style:family="paragraph" style:parent-style-name="Standard">
      <style:text-properties fo:font-weight="normal" officeooo:rsid="001d3720" officeooo:paragraph-rsid="001d3720" style:font-weight-asian="normal" style:font-weight-complex="normal"/>
    </style:style>
    <style:style style:name="P7" style:family="paragraph" style:parent-style-name="Standard">
      <style:text-properties fo:font-weight="normal" officeooo:rsid="001dcded" officeooo:paragraph-rsid="001dcded" style:font-weight-asian="normal" style:font-weight-complex="normal"/>
    </style:style>
    <style:style style:name="P8" style:family="paragraph" style:parent-style-name="Standard">
      <style:text-properties fo:font-weight="bold" officeooo:rsid="001fcd2a" officeooo:paragraph-rsid="001fcd2a" style:font-weight-asian="bold" style:font-weight-complex="bold"/>
    </style:style>
    <style:style style:name="P9" style:family="paragraph" style:parent-style-name="Standard">
      <style:text-properties fo:font-weight="normal" officeooo:rsid="001fcd2a" officeooo:paragraph-rsid="001fcd2a" style:font-weight-asian="normal" style:font-weight-complex="normal"/>
    </style:style>
    <style:style style:name="P10" style:family="paragraph" style:parent-style-name="Standard">
      <style:text-properties fo:font-weight="normal" officeooo:rsid="0021d5fc" officeooo:paragraph-rsid="0021d5fc" style:font-weight-asian="normal" style:font-weight-complex="normal"/>
    </style:style>
    <style:style style:name="P11" style:family="paragraph" style:parent-style-name="Standard">
      <style:text-properties fo:font-weight="normal" officeooo:rsid="0021f81a" officeooo:paragraph-rsid="0021f81a" style:font-weight-asian="normal" style:font-weight-complex="normal"/>
    </style:style>
    <style:style style:name="T1" style:family="text">
      <style:text-properties officeooo:rsid="001dcded"/>
    </style:style>
    <style:style style:name="T2" style:family="text">
      <style:text-properties officeooo:rsid="001d3720"/>
    </style:style>
    <style:style style:name="T3" style:family="text">
      <style:text-properties officeooo:rsid="00209590"/>
    </style:style>
    <style:style style:name="T4" style:family="text">
      <style:text-properties officeooo:rsid="0021d5fc"/>
    </style:style>
    <style:style style:name="T5" style:family="text">
      <style:text-properties officeooo:rsid="002364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 (gemini):</text:p>
      <text:p text:style-name="P2"/>
      <text:p text:style-name="P3">Hola chat, dentro de este documento el cual describe los elementos y descripción de un sistema; muestrame cuales son las partes que corresponderían a un proceso de verificación de caja negra y caja blanca.</text:p>
      <text:p text:style-name="P3"/>
      <text:p text:style-name="P3"/>
      <text:p text:style-name="P1">Documentación pruebas de caja negra y blanca dentro de Notisability:</text:p>
      <text:p text:style-name="P1"/>
      <text:p text:style-name="P1"/>
      <text:p text:style-name="P4">Caja <text:span text:style-name="T1">Negra</text:span>:</text:p>
      <text:p text:style-name="P4"/>
      <text:p text:style-name="P5">Gestión de accesos: <text:span text:style-name="T2">Comprobar el sistema de validación de roles, cerciorando que cada una de las interfaces correspondientes a cada uno de los roles sea accesible.</text:span></text:p>
      <text:p text:style-name="P5"/>
      <text:p text:style-name="P6">Flujo de E-Commerce: <text:span text:style-name="T1">Validar que el flujo de las pasarelas de pago, funcione de manera correcta, procesando transacciones de los métodos de pago que fueron planteados.</text:span></text:p>
      <text:p text:style-name="P6"/>
      <text:p text:style-name="P7">Interacción y sistema de puntuación: Test del sistemas de puntuación de productos, este debe permitir al usuario plasmar la opinión que tiene respecto a un producto y esta debe ser guardada.</text:p>
      <text:p text:style-name="P7"/>
      <text:p text:style-name="P7">Búsqueda: La barra de búsqueda implementada en la aplicación debe funcionar, de tal manera que esta muestre resultados acordes a lo que el usuario ingreso.</text:p>
      <text:p text:style-name="P7"/>
      <text:p text:style-name="P8">Caja Blanca:</text:p>
      <text:p text:style-name="P8"/>
      <text:p text:style-name="P9">Tipado y Lógica: Validar la correcta utilización de tip<text:span text:style-name="T3">ado, para evitar errores dentro del código, para este punto es importante tener en cuenta las características que ofrece el lenguaje TypeScript, </text:span><text:span text:style-name="T4">que mantiene una lógica solida, mediante la inclusión de un tipado estático a JavaScript.</text:span></text:p>
      <text:p text:style-name="P9"/>
      <text:p text:style-name="P10">Base de datos: Verificar integridad en la arquitectura de la base de datos, desde los campos presentes en cada una de las tablas que componen la base, hasta las relaciones que estas tienen entre si.</text:p>
      <text:p text:style-name="P10"/>
      <text:p text:style-name="P11">Arquitectura de módulos: Comprobar la seguridad de los permisos asignadas a cada rol, para evitar que se produzca<text:span text:style-name="T5">n asignaciones de privilegios a usuarios indebidos o la modificación de rol para estancia de un usuario, de manera desautorizada o equivocada.</text:span></text:p>
      <text:p text:style-name="P11"/>
      <text:p text:style-name="P11">Pruebas de Unidad: Durante la Fase 4 (Semanas 13), se realizaría la búsqueda de errores lógicos internos y la optimización del rendimiento de la aplicación </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18:43:49.348776600</meta:creation-date>
    <dc:date>2026-04-28T19:11:47.818638100</dc:date>
    <meta:editing-duration>PT6M25S</meta:editing-duration>
    <meta:editing-cycles>4</meta:editing-cycles>
    <meta:generator>LibreOffice/26.2.1.2$Windows_X86_64 LibreOffice_project/620$Build-2</meta:generator>
    <meta:document-statistic meta:table-count="0" meta:image-count="0" meta:object-count="0" meta:page-count="1" meta:paragraph-count="13" meta:word-count="301" meta:character-count="1885" meta:non-whitespace-character-count="1596"/>
  </office:meta>
</office:document-meta>
</file>